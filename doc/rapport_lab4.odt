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>Lab 4 – Découpage de l'espace &amp; Collision Lennard-Jones</text:h>
      <text:p/>
      <text:p>Auteurs : Neuilly, Meniane  |  Cours : C++ pour les mathématiques appliquées – Grenoble INP</text:p>
      <text:p/>
      <text:h text:outline-level="1">1. Objectif</text:h>
      <text:p>L'objectif de ce Lab est double : (1) introduire le potentiel de Lennard-Jones (LJ) comme modèle d'interaction entre particules et (2) réduire la complexité du calcul des forces de O(N²) à O(N) grâce au découpage de l'espace en cellules.</text:p>
      <text:p/>
      <text:h text:outline-level="1">2. Potentiel de Lennard-Jones</text:h>
      <text:p>Le potentiel entre deux particules séparées d'une distance r est :</text:p>
      <text:p>    U(r) = 4ε [ (σ/r)¹² − (σ/r)⁶ ]   si r ≤ rcut,  0 sinon.</text:p>
      <text:p/>
      <text:p>La force élémentaire correspondante (dérivée du potentiel global, antisymétrique) vaut :</text:p>
      <text:p>    F_ij = 24ε/r² · (σ/r)⁶ · (1 − 2(σ/r)⁶) · r_ij</text:p>
      <text:p/>
      <text:p>Le minimum de potentiel se situe en r = 2^(1/6)·σ ≈ 1.1225·σ, distance utilisée comme espacement initial entre particules à l'équilibre.</text:p>
      <text:p/>
      <text:h text:outline-level="1">3. Classe Univers et paramètres physiques</text:h>
      <text:p>La classe Univers a été enrichie des champs epsilon, sigma, use_gravity et use_LJ (initialisés par setPhysicsParams). Cela permet de basculer entre simulation gravitationnelle (use_gravity=true, use_LJ=false) et simulation LJ (use_gravity=false, use_LJ=true) sans dupliquer le code.</text:p>
      <text:p/>
      <text:h text:outline-level="1">4. Maillage en cellules et algorithme des voisines</text:h>
      <text:p>L'espace est découpé en une grille tensorielle de cubes de côté rcut. Le nombre de cellules dans chaque direction d est :</text:p>
      <text:p>    ncd_d = floor(Ld / rcut)</text:p>
      <text:p/>
      <text:p>Chaque cellule stocke des pointeurs vers les particules qu'elle contient et une liste de cellules voisines (jusqu'à 8 en 2D, 26 en 3D).</text:p>
      <text:p/>
      <text:p>Algorithme de calculerForces() (demi-coquille, Q4) :</text:p>
      <text:p>  Pour chaque cellule C :</text:p>
      <text:p>    Pour chaque paire (i, j) dans C (i &lt; j) : calculer F_ij.</text:p>
      <text:p>    Pour chaque cellule voisine V de C telle que adresse(V) &gt; adresse(C) :</text:p>
      <text:p>      Pour chaque particule i de C, j de V :</text:p>
      <text:p>        Si ||r_ij|| ≤ rcut : calculer F_ij et appliquer −F_ij à j.</text:p>
      <text:p/>
      <text:p>La condition adresse(V) &gt; adresse(C) évite le double comptage des paires inter-cellules tout en restant correct. Complexité : O(N × 27) au lieu de O(N²).</text:p>
      <text:p/>
      <text:p>Après chaque pas de temps, avancer() met à jour l'appartenance cellulaire de chaque particule qui a changé de cellule (Q5).</text:p>
      <text:p/>
      <text:h text:outline-level="1">5. Intégrateur de Störmer-Verlet</text:h>
      <text:p>L'algorithme utilisé dans evoluerVerlet() est :</text:p>
      <text:p>  1. x(t+dt) = x(t) + dt·v(t) + dt²/(2m)·F(t)   [via avancer()]</text:p>
      <text:p>  2. F(t+dt) calculé avec les nouvelles positions   [calculerForces()]</text:p>
      <text:p>  3. v(t+dt) = v(t) + dt/(2m)·(F(t) + F(t+dt))  [updateVitesse()]</text:p>
      <text:p/>
      <text:p>C'est un intégrateur symplectique d'ordre 2, qui conserve l'énergie à long terme.</text:p>
      <text:p/>
      <text:h text:outline-level="1">6. Simulation de collision (Question 6)</text:h>
      <text:h text:outline-level="2">6.1 Paramètres</text:h>
      <text:p>  ε = 5,  σ = 1,  rcut = 2.5σ = 2.5,  δt = 0.00005,  t_end = 19.5</text:p>
      <text:p>  Espacement inter-particulaire : d = 2^(1/6)·σ ≈ 1.1225</text:p>
      <text:p/>
      <text:p>  Rectangle bleu (N2 = 6400 = 160×40 particules) :</text:p>
      <text:p>    – Positionné en bas de l'univers, centré horizontalement.</text:p>
      <text:p>    – Vitesse initiale : v = (0, 0).</text:p>
      <text:p/>
      <text:p>  Carré rouge (N1 = 1600 = 40×40 particules) :</text:p>
      <text:p>    – Positionné au-dessus du rectangle avec un écart de 10 unités.</text:p>
      <text:p>    – Vitesse initiale : v = (0, −10)  [tombe vers le rectangle].</text:p>
      <text:p/>
      <text:h text:outline-level="2">6.2 Univers</text:h>
      <text:p>Univers 2D de dimensions Lx=250 × Ly=120. Le maillage comporte ncd_x = 100 et ncd_y = 48 cellules. Seul le potentiel LJ est activé (use_gravity=false).</text:p>
      <text:p/>
      <text:h text:outline-level="2">6.3 Initialisation des particules</text:h>
      <text:p>Les particules sont disposées sur une grille régulière d'espacement d. Le rectangle bleu occupe les positions (rect_x0 + ix·d, rect_y0 + iy·d) pour ix ∈ [0,159] et iy ∈ [0,39]. Le carré rouge est centré sur la même abscisse et placé juste au-dessus.</text:p>
      <text:p/>
      <text:h text:outline-level="2">6.4 Sorties</text:h>
      <text:p>Les fichiers VTK (*.vtu) sont générés toutes les 1000 itérations (≈390 fichiers pour t_end=19.5). Chaque fichier contient :</text:p>
      <text:p>  – Positions des particules.</text:p>
      <text:p>  – Vitesses.</text:p>
      <text:p>  – Masses.</text:p>
      <text:p>  – Groupe (0 = bleu, 1 = rouge) : permet de colorier les deux objets dans ParaView.</text:p>
      <text:p/>
      <text:h text:outline-level="2">6.5 Résultats attendus</text:h>
      <text:p>Au temps t=0 : deux blocs bien séparés (carré rouge au-dessus, rectangle bleu en bas). À t=19.5 : le carré a percuté le rectangle, les deux objets se déforment et des particules sont éjectées, reproduisant une collision quasi-élastique typique des simulations LJ.</text:p>
      <text:p/>
      <text:h text:outline-level="1">7. Stratégie de vérification</text:h>
      <text:p>Pour valider l'implémentation LJ et le maillage, on peut :</text:p>
      <text:p>  a) Conserver la force gravitationnelle et vérifier que les orbites keplériennes sont correctes (régression par rapport au TP3).</text:p>
      <text:p>  b) Placer deux particules isolées et vérifier analytiquement que la force calculée correspond à la formule F_ij = 24ε/r² · (σ/r)⁶ · (1−2(σ/r)⁶) · r_ij.</text:p>
      <text:p>  c) Vérifier la conservation de l'énergie totale (cinétique + potentielle LJ) sur un système périodique stable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>
    <style:style style:name="Titre1" style:family="paragraph" style:display-name="Titre1" style:parent-style-name="Heading 1"/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